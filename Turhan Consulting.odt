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20pt" style:font-size-asian="20pt" style:font-size-complex="20pt" fo:background-color="#FFFF00"/>
    </style:style>
    <style:style style:name="T3" style:parent-style-name="Absatz-Standardschriftart" style:family="text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Listenabsatz" style:list-style-name="LFO1" style:family="paragraph">
      <style:text-properties fo:font-size="14pt" style:font-size-asian="14pt" style:font-size-complex="14pt"/>
    </style:style>
    <style:style style:name="P6" style:parent-style-name="Listenabsatz" style:list-style-name="LFO1" style:family="paragraph">
      <style:text-properties fo:font-size="14pt" style:font-size-asian="14pt" style:font-size-complex="14pt"/>
    </style:style>
    <style:style style:name="P7" style:parent-style-name="Listenabsatz" style:list-style-name="LFO1" style:family="paragraph">
      <style:text-properties fo:font-size="14pt" style:font-size-asian="14pt" style:font-size-complex="14pt"/>
    </style:style>
    <style:style style:name="P8" style:parent-style-name="Listenabsatz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0" style:parent-style-name="Listenabsatz" style:list-style-name="LFO1" style:family="paragraph">
      <style:text-properties fo:font-size="14pt" style:font-size-asian="14pt" style:font-size-complex="14pt"/>
    </style:style>
    <style:style style:name="P11" style:parent-style-name="Listenabsatz" style:list-style-name="LFO1" style:family="paragraph">
      <style:text-properties fo:font-size="14pt" style:font-size-asian="14pt" style:font-size-complex="14pt"/>
    </style:style>
    <style:style style:name="P12" style:parent-style-name="Listenabsatz" style:list-style-name="LFO1" style:family="paragraph">
      <style:text-properties fo:font-size="14pt" style:font-size-asian="14pt" style:font-size-complex="14pt"/>
    </style:style>
    <style:style style:name="P13" style:parent-style-name="Listenabsatz" style:list-style-name="LFO1" style:family="paragraph">
      <style:text-properties fo:font-size="14pt" style:font-size-asian="14pt" style:font-size-complex="14pt"/>
    </style:style>
    <style:style style:name="P14" style:parent-style-name="Listenabsatz" style:list-style-name="LFO1" style:family="paragraph">
      <style:text-properties fo:font-size="14pt" style:font-size-asian="14pt" style:font-size-complex="14pt"/>
    </style:style>
    <style:style style:name="P15" style:parent-style-name="Listenabsatz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8" style:parent-style-name="Listenabsatz" style:list-style-name="LFO1" style:family="paragraph">
      <style:text-properties fo:font-size="14pt" style:font-size-asian="14pt" style:font-size-complex="14pt"/>
    </style:style>
    <style:style style:name="P19" style:parent-style-name="Listenabsatz" style:list-style-name="LFO1" style:family="paragraph">
      <style:text-properties fo:font-size="14pt" style:font-size-asian="14pt" style:font-size-complex="14pt"/>
    </style:style>
    <style:style style:name="P20" style:parent-style-name="Listenabsatz" style:list-style-name="LFO1" style:family="paragraph">
      <style:text-properties fo:font-size="14pt" style:font-size-asian="14pt" style:font-size-complex="14pt"/>
    </style:style>
    <style:style style:name="P21" style:parent-style-name="Listenabsatz" style:list-style-name="LFO1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Turhan Consulting</text:span><text:span text:style-name="T3"><text:s/></text:span></text:p>
      <text:p text:style-name="P4">Bundle 1:</text:p>
      <text:list text:style-name="LFO1" text:continue-numbering="true">
        <text:list-item>
          <text:p text:style-name="P5">Rechnungserstellung (Bis zu 30 Exemplaren)</text:p>
        </text:list-item>
        <text:list-item>
          <text:p text:style-name="P6">Abnahmeprotkollserstellung (Bis zu 30 Exemplaren)</text:p>
        </text:list-item>
        <text:list-item>
          <text:p text:style-name="P7">Angebotserstellung (Bis zu 30 Exemplaren)</text:p>
        </text:list-item>
      </text:list>
      <text:p text:style-name="P8">~ 349 €</text:p>
      <text:p text:style-name="P9">Bundle 2:</text:p>
      <text:list text:style-name="LFO1" text:continue-numbering="true">
        <text:list-item>
          <text:p text:style-name="P10">Alles aus Bundle 1</text:p>
        </text:list-item>
        <text:list-item>
          <text:p text:style-name="P11">Mahnungserstellung<text:s/></text:p>
        </text:list-item>
        <text:list-item>
          <text:p text:style-name="P12">OP-Pflege</text:p>
        </text:list-item>
        <text:list-item>
          <text:p text:style-name="P13">Monat-/ Jahresexport an Steuerberater</text:p>
        </text:list-item>
        <text:list-item>
          <text:p text:style-name="P14">Ausgabenverwaltung</text:p>
        </text:list-item>
      </text:list>
      <text:p text:style-name="P15">~ 749 €</text:p>
      <text:p text:style-name="P16"/>
      <text:p text:style-name="P17">Das wird von der Firma gebraucht:</text:p>
      <text:list text:style-name="LFO1" text:continue-numbering="true">
        <text:list-item>
          <text:p text:style-name="P18">Stammdaten: Firmenname, Straße &amp; Hausnr., PLZ % Ort, Geschäftsführer, Bankverbindung (IBAN, BIC, Bankname), Ust-ID-Nr.</text:p>
        </text:list-item>
        <text:list-item>
          <text:p text:style-name="P19">Logo (Am besten)</text:p>
        </text:list-item>
        <text:list-item>
          <text:p text:style-name="P20">Preisliste</text:p>
        </text:list-item>
        <text:list-item>
          <text:p text:style-name="P21">Kundenliste<text:s/></text:p>
        </text:list-item>
      </text:list>
      <text:p text:style-name="Listenabsatz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elal Turhan</meta:initial-creator>
    <dc:creator>Celal Turhan</dc:creator>
    <meta:creation-date>2026-02-20T08:06:00Z</meta:creation-date>
    <dc:date>2026-02-20T08:21:00Z</dc:date>
    <meta:template xlink:href="Normal" xlink:type="simple"/>
    <meta:editing-cycles>1</meta:editing-cycles>
    <meta:editing-duration>PT0S</meta:editing-duration>
    <meta:document-statistic meta:page-count="1" meta:paragraph-count="1" meta:word-count="67" meta:character-count="491" meta:row-count="3" meta:non-whitespace-character-count="425"/>
  </office:meta>
</office:document-meta>
</file>